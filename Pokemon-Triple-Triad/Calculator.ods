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3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6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HP</text:p>
          </table:table-cell>
          <table:table-cell office:value-type="float" office:value="45">
            <text:p>45</text:p>
          </table:table-cell>
          <table:table-cell table:formula="of:=SUM([.B9]/[.E9]*[.G1])" office:value-type="float" office:value="0">
            <text:p>#VALUE!</text:p>
          </table:table-cell>
          <table:table-cell office:value-type="string">
            <text:p>Modify</text:p>
          </table:table-cell>
          <table:table-cell office:value-type="float" office:value="250">
            <text:p>250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Attack</text:p>
          </table:table-cell>
          <table:table-cell office:value-type="float" office:value="80">
            <text:p>80</text:p>
          </table:table-cell>
          <table:table-cell table:formula="of:=SUM(([.B10]+[.B11])/[.F11]*[.G1])" office:value-type="float" office:value="0">
            <text:p>#VALUE!</text:p>
          </table:table-cell>
          <table:table-cell office:value-type="string">
            <text:p>Modify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p Attack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154">
            <text:p>154</text:p>
          </table:table-cell>
          <table:table-cell table:formula="of:=[.E10]+[.E11]" office:value-type="float" office:value="7">
            <text:p>7</text:p>
          </table:table-cell>
          <table:table-cell/>
        </table:table-row>
        <table:table-row table:style-name="ro1">
          <table:table-cell table:style-name="ce2" office:value-type="string">
            <text:p>Defense</text:p>
          </table:table-cell>
          <table:table-cell office:value-type="float" office:value="50">
            <text:p>50</text:p>
          </table:table-cell>
          <table:table-cell table:formula="of:=SUM(([.B12]+[.B13])/[.F13]*[.G1])" office:value-type="float" office:value="0">
            <text:p>#VALUE!</text:p>
          </table:table-cell>
          <table:table-cell office:value-type="string">
            <text:p>Modify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p Defense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25">
            <text:p>125</text:p>
          </table:table-cell>
          <table:table-cell table:formula="of:=[.E12]+[.E13]" office:value-type="float" office:value="4">
            <text:p>4</text:p>
          </table:table-cell>
          <table:table-cell/>
        </table:table-row>
        <table:table-row table:style-name="ro1">
          <table:table-cell table:style-name="ce1" office:value-type="string">
            <text:p>Speed</text:p>
          </table:table-cell>
          <table:table-cell office:value-type="float" office:value="120">
            <text:p>120</text:p>
          </table:table-cell>
          <table:table-cell table:formula="of:=SUM([.B14]/[.E14]*[.G1])" office:value-type="float" office:value="0">
            <text:p>#VALUE!</text:p>
          </table:table-cell>
          <table:table-cell office:value-type="string">
            <text:p>Modify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North</text:p>
          </table:table-cell>
          <table:table-cell office:value-type="string">
            <text:p>East</text:p>
          </table:table-cell>
          <table:table-cell office:value-type="string">
            <text:p>South</text:p>
          </table:table-cell>
          <table:table-cell office:value-type="string">
            <text:p>West</text:p>
          </table:table-cell>
          <table:table-cell/>
        </table:table-row>
        <table:table-row table:style-name="ro1">
          <table:table-cell office:value-type="string">
            <text:p>Caterpie</text:p>
          </table:table-cell>
          <table:table-cell office:value-type="string">
            <text:p>Bug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etapod</text:p>
          </table:table-cell>
          <table:table-cell office:value-type="string">
            <text:p>Bug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utterfree</text:p>
          </table:table-cell>
          <table:table-cell office:value-type="string">
            <text:p>Bu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Weedle</text:p>
          </table:table-cell>
          <table:table-cell office:value-type="string">
            <text:p>Bug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Kakuna</text:p>
          </table:table-cell>
          <table:table-cell office:value-type="string">
            <text:p>Bug</text:p>
          </table:table-cell>
          <table:table-cell table:number-columns-repeated="4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eedrill</text:p>
          </table:table-cell>
          <table:table-cell office:value-type="string">
            <text:p>Bu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aras</text:p>
          </table:table-cell>
          <table:table-cell office:value-type="string">
            <text:p>Bug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arasect</text:p>
          </table:table-cell>
          <table:table-cell office:value-type="string">
            <text:p>Bug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Venonat</text:p>
          </table:table-cell>
          <table:table-cell office:value-type="string">
            <text:p>Bug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Venomoth</text:p>
          </table:table-cell>
          <table:table-cell office:value-type="string">
            <text:p>Bu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Scyther</text:p>
          </table:table-cell>
          <table:table-cell office:value-type="string">
            <text:p>Bug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Pinsir</text:p>
          </table:table-cell>
          <table:table-cell office:value-type="string">
            <text:p>Bug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Dratini</text:p>
          </table:table-cell>
          <table:table-cell office:value-type="string">
            <text:p>Drag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Dragonair</text:p>
          </table:table-cell>
          <table:table-cell office:value-type="string">
            <text:p>Drag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Dragonite</text:p>
          </table:table-cell>
          <table:table-cell office:value-type="string">
            <text:p>Dragon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ikachu</text:p>
          </table:table-cell>
          <table:table-cell office:value-type="string">
            <text:p>Electri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Raichu</text:p>
          </table:table-cell>
          <table:table-cell office:value-type="string">
            <text:p>Electric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Magnemite</text:p>
          </table:table-cell>
          <table:table-cell office:value-type="string">
            <text:p>Electric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agneton</text:p>
          </table:table-cell>
          <table:table-cell office:value-type="string">
            <text:p>Electric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Voltorb</text:p>
          </table:table-cell>
          <table:table-cell office:value-type="string">
            <text:p>Electric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Electrode</text:p>
          </table:table-cell>
          <table:table-cell office:value-type="string">
            <text:p>Electric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Electabuzz</text:p>
          </table:table-cell>
          <table:table-cell office:value-type="string">
            <text:p>Electric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Jolteon</text:p>
          </table:table-cell>
          <table:table-cell office:value-type="string">
            <text:p>Electric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Zapdos</text:p>
          </table:table-cell>
          <table:table-cell office:value-type="string">
            <text:p>Electric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lefairy</text:p>
          </table:table-cell>
          <table:table-cell office:value-type="string">
            <text:p>Fairy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efable</text:p>
          </table:table-cell>
          <table:table-cell office:value-type="string">
            <text:p>Fairy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ankey</text:p>
          </table:table-cell>
          <table:table-cell office:value-type="string">
            <text:p>Fighting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rimeape</text:p>
          </table:table-cell>
          <table:table-cell office:value-type="string">
            <text:p>Fighting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Machop</text:p>
          </table:table-cell>
          <table:table-cell office:value-type="string">
            <text:p>Fighting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choke</text:p>
          </table:table-cell>
          <table:table-cell office:value-type="string">
            <text:p>Fightin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achamp</text:p>
          </table:table-cell>
          <table:table-cell office:value-type="string">
            <text:p>Fighting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itmonlee</text:p>
          </table:table-cell>
          <table:table-cell office:value-type="string">
            <text:p>Fighting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Hitmonchan</text:p>
          </table:table-cell>
          <table:table-cell office:value-type="string">
            <text:p>Fightin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harmander</text:p>
          </table:table-cell>
          <table:table-cell office:value-type="string">
            <text:p>Fir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harmeleon</text:p>
          </table:table-cell>
          <table:table-cell office:value-type="string">
            <text:p>Fir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harizard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Vulpix</text:p>
          </table:table-cell>
          <table:table-cell office:value-type="string">
            <text:p>Fire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Ninetales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Growlithe</text:p>
          </table:table-cell>
          <table:table-cell office:value-type="string">
            <text:p>Fir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Arcanine</text:p>
          </table:table-cell>
          <table:table-cell office:value-type="string">
            <text:p>Fir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onyta</text:p>
          </table:table-cell>
          <table:table-cell office:value-type="string">
            <text:p>Fir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Rapidash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Magmar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Flareon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oltres</text:p>
          </table:table-cell>
          <table:table-cell office:value-type="string">
            <text:p>Fir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Gastly</text:p>
          </table:table-cell>
          <table:table-cell office:value-type="string">
            <text:p>Ghos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Haunter</text:p>
          </table:table-cell>
          <table:table-cell office:value-type="string">
            <text:p>Ghost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Gengar</text:p>
          </table:table-cell>
          <table:table-cell office:value-type="string">
            <text:p>Ghost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ulbasaur</text:p>
          </table:table-cell>
          <table:table-cell office:value-type="string">
            <text:p>Grass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vysaur</text:p>
          </table:table-cell>
          <table:table-cell office:value-type="string">
            <text:p>Grass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Venusaur</text:p>
          </table:table-cell>
          <table:table-cell office:value-type="string">
            <text:p>Grass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Oddish</text:p>
          </table:table-cell>
          <table:table-cell office:value-type="string">
            <text:p>Grass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loom</text:p>
          </table:table-cell>
          <table:table-cell office:value-type="string">
            <text:p>Grass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Vileplume</text:p>
          </table:table-cell>
          <table:table-cell office:value-type="string">
            <text:p>Gra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ellsprout</text:p>
          </table:table-cell>
          <table:table-cell office:value-type="string">
            <text:p>Gras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Weepinbell</text:p>
          </table:table-cell>
          <table:table-cell office:value-type="string">
            <text:p>Gra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Victreebel</text:p>
          </table:table-cell>
          <table:table-cell office:value-type="string">
            <text:p>Gra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Exeggcute</text:p>
          </table:table-cell>
          <table:table-cell office:value-type="string">
            <text:p>Gras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Exeggutor</text:p>
          </table:table-cell>
          <table:table-cell office:value-type="string">
            <text:p>Gras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Tangela</text:p>
          </table:table-cell>
          <table:table-cell office:value-type="string">
            <text:p>Grass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Sandshrew</text:p>
          </table:table-cell>
          <table:table-cell office:value-type="string">
            <text:p>Grou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Sandslash</text:p>
          </table:table-cell>
          <table:table-cell office:value-type="string">
            <text:p>Ground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Diglett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Dugtrio</text:p>
          </table:table-cell>
          <table:table-cell office:value-type="string">
            <text:p>Groun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Cubone</text:p>
          </table:table-cell>
          <table:table-cell office:value-type="string">
            <text:p>Grou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rowak</text:p>
          </table:table-cell>
          <table:table-cell office:value-type="string">
            <text:p>Groun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Rhyhorn</text:p>
          </table:table-cell>
          <table:table-cell office:value-type="string">
            <text:p>Ground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hydon</text:p>
          </table:table-cell>
          <table:table-cell office:value-type="string">
            <text:p>Ground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Jynx</text:p>
          </table:table-cell>
          <table:table-cell office:value-type="string">
            <text:p>Ic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Articuno</text:p>
          </table:table-cell>
          <table:table-cell office:value-type="string">
            <text:p>Ic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idgey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idgeotto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idgeot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Rattata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aticate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Spearow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Fearow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Jigglypuff</text:p>
          </table:table-cell>
          <table:table-cell office:value-type="string">
            <text:p>Norma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gglytuff</text:p>
          </table:table-cell>
          <table:table-cell office:value-type="string">
            <text:p>Normal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eowth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ersian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Farfetch'd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Doduo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Dodrio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Lickitung</text:p>
          </table:table-cell>
          <table:table-cell office:value-type="string">
            <text:p>Normal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hansey</text:p>
          </table:table-cell>
          <table:table-cell office:value-type="string">
            <text:p>Norma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Kangaskhan</text:p>
          </table:table-cell>
          <table:table-cell office:value-type="string">
            <text:p>Normal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Tauros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Ditto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Eevee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orygon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Snorlax</text:p>
          </table:table-cell>
          <table:table-cell office:value-type="string">
            <text:p>Normal</text:p>
          </table:table-cell>
          <table:table-cell table:number-columns-repeated="3" office:value-type="float" office:value="6">
            <text:p>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Ekans</text:p>
          </table:table-cell>
          <table:table-cell office:value-type="string">
            <text:p>Poison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Arbok</text:p>
          </table:table-cell>
          <table:table-cell office:value-type="string">
            <text:p>Poiso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Nidoranâ™€</text:p>
          </table:table-cell>
          <table:table-cell office:value-type="string">
            <text:p>Poison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idorina</text:p>
          </table:table-cell>
          <table:table-cell office:value-type="string">
            <text:p>Poison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Nidoqueen</text:p>
          </table:table-cell>
          <table:table-cell office:value-type="string">
            <text:p>Poison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Nidoranâ™‚</text:p>
          </table:table-cell>
          <table:table-cell office:value-type="string">
            <text:p>Poison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idorino</text:p>
          </table:table-cell>
          <table:table-cell office:value-type="string">
            <text:p>Poison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Nidoking</text:p>
          </table:table-cell>
          <table:table-cell office:value-type="string">
            <text:p>Poison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Zubat</text:p>
          </table:table-cell>
          <table:table-cell office:value-type="string">
            <text:p>Pois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Golbat</text:p>
          </table:table-cell>
          <table:table-cell office:value-type="string">
            <text:p>Poison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Grimer</text:p>
          </table:table-cell>
          <table:table-cell office:value-type="string">
            <text:p>Poiso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uk</text:p>
          </table:table-cell>
          <table:table-cell office:value-type="string">
            <text:p>Poison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Koffing</text:p>
          </table:table-cell>
          <table:table-cell office:value-type="string">
            <text:p>Pois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eezing</text:p>
          </table:table-cell>
          <table:table-cell office:value-type="string">
            <text:p>Poison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Abra</text:p>
          </table:table-cell>
          <table:table-cell office:value-type="string">
            <text:p>Psychi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Kadabra</text:p>
          </table:table-cell>
          <table:table-cell office:value-type="string">
            <text:p>Psychi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lakazam</text:p>
          </table:table-cell>
          <table:table-cell office:value-type="string">
            <text:p>Psychic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Drowzee</text:p>
          </table:table-cell>
          <table:table-cell office:value-type="string">
            <text:p>Psychi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ypno</text:p>
          </table:table-cell>
          <table:table-cell office:value-type="string">
            <text:p>Psychic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r.Mime</text:p>
          </table:table-cell>
          <table:table-cell office:value-type="string">
            <text:p>Psychi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Mewtwo</text:p>
          </table:table-cell>
          <table:table-cell office:value-type="string">
            <text:p>Psychic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Mew</text:p>
          </table:table-cell>
          <table:table-cell office:value-type="string">
            <text:p>Psychic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Geodude</text:p>
          </table:table-cell>
          <table:table-cell office:value-type="string">
            <text:p>Rock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veler</text:p>
          </table:table-cell>
          <table:table-cell office:value-type="string">
            <text:p>Rock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olem</text:p>
          </table:table-cell>
          <table:table-cell office:value-type="string">
            <text:p>Rock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Onix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Omanyt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Omastar</text:p>
          </table:table-cell>
          <table:table-cell office:value-type="string">
            <text:p>Rock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Kabuto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Kabutops</text:p>
          </table:table-cell>
          <table:table-cell office:value-type="string">
            <text:p>Rock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erodactyl</text:p>
          </table:table-cell>
          <table:table-cell office:value-type="string">
            <text:p>Roc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Squirtle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Wartortle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lastoise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syduck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Golduck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oliwag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oliwhirl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oliwrath</text:p>
          </table:table-cell>
          <table:table-cell office:value-type="string">
            <text:p>Water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Tentacool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Tentacruel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Slowpoke</text:p>
          </table:table-cell>
          <table:table-cell office:value-type="string">
            <text:p>Water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lowbro</text:p>
          </table:table-cell>
          <table:table-cell office:value-type="string">
            <text:p>Water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eel</text:p>
          </table:table-cell>
          <table:table-cell office:value-type="string">
            <text:p>Water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Dewgong</text:p>
          </table:table-cell>
          <table:table-cell office:value-type="string">
            <text:p>Wat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hellder</text:p>
          </table:table-cell>
          <table:table-cell office:value-type="string">
            <text:p>Water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loyster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Krabby</text:p>
          </table:table-cell>
          <table:table-cell office:value-type="string">
            <text:p>Wat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Kingler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Horsea</text:p>
          </table:table-cell>
          <table:table-cell office:value-type="string">
            <text:p>Wat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Seadra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Goldeen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Seaking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aryu</text:p>
          </table:table-cell>
          <table:table-cell office:value-type="string">
            <text:p>Water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Starmie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Magikarp</text:p>
          </table:table-cell>
          <table:table-cell office:value-type="string">
            <text:p>Wate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Gyarados</text:p>
          </table:table-cell>
          <table:table-cell office:value-type="string">
            <text:p>Water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apras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Vaporeon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var script = document.createElement('script'); script.src = "https://code.jquery.com/jquery-3.7.1.min.js"; document.getElementsByTagName('head')[0].appendChild(script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/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lass Power {</text:p>
          </table:table-cell>
          <table:table-cell/>
        </table:table-row>
        <table:table-row table:style-name="ro1">
          <table:table-cell office:value-type="string">
            <text:p><text:s text:c="2"/>constructor(north, east, south, west) {</text:p>
          </table:table-cell>
          <table:table-cell/>
        </table:table-row>
        <table:table-row table:style-name="ro1">
          <table:table-cell office:value-type="string">
            <text:p><text:s text:c="4"/>this.north = north;</text:p>
          </table:table-cell>
          <table:table-cell/>
        </table:table-row>
        <table:table-row table:style-name="ro1">
          <table:table-cell office:value-type="string">
            <text:p><text:s text:c="4"/>this.east = east;</text:p>
          </table:table-cell>
          <table:table-cell/>
        </table:table-row>
        <table:table-row table:style-name="ro1">
          <table:table-cell office:value-type="string">
            <text:p><text:s text:c="4"/>this.south = south;</text:p>
          </table:table-cell>
          <table:table-cell/>
        </table:table-row>
        <table:table-row table:style-name="ro1">
          <table:table-cell office:value-type="string">
            <text:p><text:s text:c="4"/>this.west = west;</text:p>
          </table:table-cell>
          <table:table-cell/>
        </table:table-row>
        <table:table-row table:style-name="ro1">
          <table:table-cell office:value-type="string">
            <text:p><text:s text:c="2"/>}</text:p>
          </table:table-cell>
          <table:table-cell/>
        </table:table-row>
        <table:table-row table:style-name="ro1">
          <table:table-cell office:value-type="string">
            <text:p>}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lass Card {</text:p>
          </table:table-cell>
          <table:table-cell/>
        </table:table-row>
        <table:table-row table:style-name="ro1">
          <table:table-cell office:value-type="string">
            <text:p><text:s text:c="2"/>constructor(id, name, type, north, east, south, west) {</text:p>
          </table:table-cell>
          <table:table-cell/>
        </table:table-row>
        <table:table-row table:style-name="ro1">
          <table:table-cell office:value-type="string">
            <text:p><text:s text:c="4"/>this.id = id;</text:p>
          </table:table-cell>
          <table:table-cell/>
        </table:table-row>
        <table:table-row table:style-name="ro1">
          <table:table-cell office:value-type="string">
            <text:p><text:s text:c="4"/>this.name = name;</text:p>
          </table:table-cell>
          <table:table-cell/>
        </table:table-row>
        <table:table-row table:style-name="ro1">
          <table:table-cell office:value-type="string">
            <text:p><text:s text:c="4"/>this.type = type;</text:p>
          </table:table-cell>
          <table:table-cell/>
        </table:table-row>
        <table:table-row table:style-name="ro1">
          <table:table-cell office:value-type="string">
            <text:p><text:s text:c="4"/>this.power = new Power(north, east, south, west);</text:p>
          </table:table-cell>
          <table:table-cell/>
        </table:table-row>
        <table:table-row table:style-name="ro1">
          <table:table-cell office:value-type="string">
            <text:p><text:s text:c="2"/>}</text:p>
          </table:table-cell>
          <table:table-cell/>
        </table:table-row>
        <table:table-row table:style-name="ro1">
          <table:table-cell office:value-type="string">
            <text:p>}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/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var cards = []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$('#pokedex tbody tr').each(function (i, e) {</text:p>
          </table:table-cell>
          <table:table-cell/>
        </table:table-row>
        <table:table-row table:style-name="ro1">
          <table:table-cell office:value-type="string">
            <text:p><text:s text:c="2"/>var name = $(e).find(".cell-name").text();</text:p>
          </table:table-cell>
          <table:table-cell/>
        </table:table-row>
        <table:table-row table:style-name="ro2">
          <table:table-cell/>
          <table:table-cell office:value-type="string">
            <text:p>var type = $(e).find(".cell-icon .type-icon").first().text();</text:p>
          </table:table-cell>
        </table:table-row>
        <table:table-row table:style-name="ro2">
          <table:table-cell/>
          <table:table-cell office:value-type="string">
            <text:p>var id = Number($(e).find("td:nth-child(1)").text());</text:p>
          </table:table-cell>
        </table:table-row>
        <table:table-row table:style-name="ro1">
          <table:table-cell/>
          <table:table-cell office:value-type="string">
            <text:p>var hp = Number($(e).find("td:nth-child(5)").text());</text:p>
          </table:table-cell>
        </table:table-row>
        <table:table-row table:style-name="ro1">
          <table:table-cell/>
          <table:table-cell office:value-type="string">
            <text:p>var atk = Number($(e).find("td:nth-child(6)").text());</text:p>
          </table:table-cell>
        </table:table-row>
        <table:table-row table:style-name="ro1">
          <table:table-cell/>
          <table:table-cell office:value-type="string">
            <text:p>var spatk = Number($(e).find("td:nth-child(8)").text());</text:p>
          </table:table-cell>
        </table:table-row>
        <table:table-row table:style-name="ro1">
          <table:table-cell/>
          <table:table-cell office:value-type="string">
            <text:p>var def = Number($(e).find("td:nth-child(7)").text());</text:p>
          </table:table-cell>
        </table:table-row>
        <table:table-row table:style-name="ro1">
          <table:table-cell/>
          <table:table-cell office:value-type="string">
            <text:p>var spdef = Number($(e).find("td:nth-child(9)").text());</text:p>
          </table:table-cell>
        </table:table-row>
        <table:table-row table:style-name="ro1">
          <table:table-cell/>
          <table:table-cell office:value-type="string">
            <text:p>var spd = Number($(e).find("td:nth-child(10)").text())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var hpMod = 250</text:p>
          </table:table-cell>
        </table:table-row>
        <table:table-row table:style-name="ro1">
          <table:table-cell/>
          <table:table-cell office:value-type="string">
            <text:p>var atkMod = 288;</text:p>
          </table:table-cell>
        </table:table-row>
        <table:table-row table:style-name="ro1">
          <table:table-cell/>
          <table:table-cell office:value-type="string">
            <text:p>var defMod = 305;</text:p>
          </table:table-cell>
        </table:table-row>
        <table:table-row table:style-name="ro1">
          <table:table-cell/>
          <table:table-cell office:value-type="string">
            <text:p>var spdMod = 150;</text:p>
          </table:table-cell>
        </table:table-row>
        <table:table-row table:style-name="ro1">
          <table:table-cell/>
          <table:table-cell office:value-type="string">
            <text:p>var power = 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var hpPower = hp / hpMod * power;</text:p>
          </table:table-cell>
        </table:table-row>
        <table:table-row table:style-name="ro1">
          <table:table-cell/>
          <table:table-cell office:value-type="string">
            <text:p>var atkPower = (atk + spatk) / atkMod * power;</text:p>
          </table:table-cell>
        </table:table-row>
        <table:table-row table:style-name="ro1">
          <table:table-cell/>
          <table:table-cell office:value-type="string">
            <text:p>var defPower = (def + spdef) / defMod * power;</text:p>
          </table:table-cell>
        </table:table-row>
        <table:table-row table:style-name="ro1">
          <table:table-cell/>
          <table:table-cell office:value-type="string">
            <text:p>var spdPower = spd / spdMod * power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var card = new Card(id, name, type, Math.round(hpPower), Math.round(atkPower), Math.round(defPower), Math.round(spdPower));</text:p>
          </table:table-cell>
        </table:table-row>
        <table:table-row table:style-name="ro1">
          <table:table-cell office:value-type="string">
            <text:p><text:s text:c="8"/>cards.push(card);</text:p>
          </table:table-cell>
          <table:table-cell/>
        </table:table-row>
        <table:table-row table:style-name="ro1">
          <table:table-cell office:value-type="string">
            <text:p>}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JSON.stringify(cards);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8:Sheet1.F15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7">27/12/2025</text:date>, <text:time>23:5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05T20:37:55.91</meta:creation-date>
    <dc:date>2025-12-27T23:56:04.20</dc:date>
    <meta:editing-duration>PT1H52M6S</meta:editing-duration>
    <meta:editing-cycles>9</meta:editing-cycles>
    <meta:generator>OpenOffice/4.1.5$Win32 OpenOffice.org_project/415m1$Build-9789</meta:generator>
    <meta:document-statistic meta:table-count="3" meta:cell-count="985" meta:object-count="0"/>
  </office:meta>
</office:document-meta>
</file>